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2640C2A9FF40DEAB3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835in" svg:y="-0.2811in" svg:width="6.6929in" svg:height="6.3307in" draw:z-index="0"><draw:image xlink:href="Pictures/1000000100000287000002640C2A9FF40DEAB3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21:03:07.618885482</meta:creation-date>
    <dc:date>2026-05-14T21:03:46.835011970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