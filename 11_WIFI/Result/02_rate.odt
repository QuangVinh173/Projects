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0F73F60093A207A4166.png" manifest:media-type="image/png"/>
  <manifest:file-entry manifest:full-path="Pictures/10000001000002870000025F844777EFB7B639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009" officeooo:paragraph-rsid="001260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-0.1772in" svg:width="6.6929in" svg:height="6.2791in" draw:z-index="0"><draw:image xlink:href="Pictures/10000001000002870000025F844777EFB7B639A4.png" xlink:type="simple" xlink:show="embed" xlink:actuate="onLoad" draw:mime-type="image/png"/></draw:frame><text:s/></text:p>
      <text:p text:style-name="Standard"/>
      <text:p text:style-name="P1"><draw:frame draw:style-name="fr1" draw:name="Image2" text:anchor-type="char" svg:width="5.5728in" svg:height="2.5728in" draw:z-index="1"><draw:image xlink:href="Pictures/1000000100000217000000F73F60093A207A41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21:03:07.618885482</meta:creation-date>
    <dc:date>2026-05-14T21:04:49.855163828</dc:date>
    <meta:editing-duration>PT1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" meta:word-count="0" meta:character-count="1" meta:non-whitespace-character-count="0"/>
  </office:meta>
</office:document-meta>
</file>